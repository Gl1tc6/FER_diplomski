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5.8743in" fo:margin-top="0in" fo:margin-bottom="0in" table:align="center" style:writing-mode="lr-tb"/>
    </style:style>
    <style:style style:name="Table3.A" style:family="table-column">
      <style:table-column-properties style:column-width="0.8736in"/>
    </style:style>
    <style:style style:name="Table3.B" style:family="table-column">
      <style:table-column-properties style:column-width="0.875in"/>
    </style:style>
    <style:style style:name="Table3.D" style:family="table-column">
      <style:table-column-properties style:column-width="3.25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7979in" fo:margin-top="0in" fo:margin-bottom="0in" table:align="center" style:writing-mode="lr-tb"/>
    </style:style>
    <style:style style:name="Table4.A" style:family="table-column">
      <style:table-column-properties style:column-width="1.6431in"/>
    </style:style>
    <style:style style:name="Table4.B" style:family="table-column">
      <style:table-column-properties style:column-width="0.8743in"/>
    </style:style>
    <style:style style:name="Table4.C" style:family="table-column">
      <style:table-column-properties style:column-width="1.6604in"/>
    </style:style>
    <style:style style:name="Table4.D" style:family="table-column">
      <style:table-column-properties style:column-width="1.619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181in" fo:margin-left="0in" fo:margin-top="0in" fo:margin-bottom="0in" fo:break-before="page" table:align="left" style:writing-mode="page"/>
    </style:style>
    <style:style style:name="Table5.A" style:family="table-column">
      <style:table-column-properties style:column-width="3.2083in"/>
    </style:style>
    <style:style style:name="Table5.B" style:family="table-column">
      <style:table-column-properties style:column-width="3.209in"/>
    </style:style>
    <style:style style:name="Table5.1" style:family="table-row">
      <style:table-row-properties style:min-row-height="0.2396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4181in" fo:margin-left="0in" fo:margin-top="0in" fo:margin-bottom="0in" table:align="left" style:writing-mode="page"/>
    </style:style>
    <style:style style:name="Table8.A" style:family="table-column">
      <style:table-column-properties style:column-width="3.2083in"/>
    </style:style>
    <style:style style:name="Table8.B" style:family="table-column">
      <style:table-column-properties style:column-width="3.20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6.4181in" fo:margin-left="0in" fo:margin-top="0in" fo:margin-bottom="0in" table:align="left" style:writing-mode="page"/>
    </style:style>
    <style:style style:name="Table9.A" style:family="table-column">
      <style:table-column-properties style:column-width="3.2083in"/>
    </style:style>
    <style:style style:name="Table9.B" style:family="table-column">
      <style:table-column-properties style:column-width="3.209in"/>
    </style:style>
    <style:style style:name="Table9.1" style:family="table-row">
      <style:table-row-properties style:min-row-height="0.2396in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itle" style:master-page-name="Standard">
      <style:paragraph-properties fo:text-align="end" style:justify-single-word="false" style:page-number="auto"/>
      <style:text-properties officeooo:rsid="00053e5b" officeooo:paragraph-rsid="00053e5b"/>
    </style:style>
    <style:style style:name="P2" style:family="paragraph" style:parent-style-name="Title">
      <style:paragraph-properties fo:text-align="end" style:justify-single-word="false"/>
    </style:style>
    <style:style style:name="P3" style:family="paragraph" style:parent-style-name="Title">
      <style:paragraph-properties fo:text-align="end" style:justify-single-word="false"/>
      <style:text-properties fo:language="hr" fo:country="HR"/>
    </style:style>
    <style:style style:name="P4" style:family="paragraph" style:parent-style-name="Title">
      <style:paragraph-properties fo:margin-top="0in" fo:margin-bottom="0in" style:contextual-spacing="false" fo:text-align="end" style:justify-single-word="false"/>
    </style:style>
    <style:style style:name="P5" style:family="paragraph" style:parent-style-name="Title" style:master-page-name="Converted1">
      <style:paragraph-properties style:page-number="auto"/>
    </style:style>
    <style:style style:name="P6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0.2957in"/>
          <style:tab-stop style:position="6.5in" style:type="right"/>
        </style:tab-stops>
      </style:paragraph-properties>
    </style:style>
    <style:style style:name="P8" style:family="paragraph" style:parent-style-name="Title">
      <style:text-properties fo:language="hr" fo:country="HR"/>
    </style:style>
    <style:style style:name="P9" style:family="paragraph" style:parent-style-name="Standard">
      <style:paragraph-properties fo:margin-top="0in" fo:margin-bottom="0in" style:contextual-spacing="false" fo:text-indent="0in" style:auto-text-indent="false" fo:break-before="page"/>
    </style:style>
    <style:style style:name="P10" style:family="paragraph" style:parent-style-name="InfoBlue">
      <style:text-properties fo:language="hr" fo:country="HR"/>
    </style:style>
    <style:style style:name="P11" style:family="paragraph" style:parent-style-name="Text_20_body">
      <style:text-properties fo:language="hr" fo:country="HR"/>
    </style:style>
    <style:style style:name="P12" style:family="paragraph" style:parent-style-name="Heading_20_1">
      <style:paragraph-properties fo:margin-top="0in" fo:margin-bottom="0.0417in" style:contextual-spacing="false" fo:break-before="page"/>
    </style:style>
    <style:style style:name="P13" style:family="paragraph" style:parent-style-name="Text_20_body">
      <style:paragraph-properties fo:margin-left="0in" fo:margin-top="0in" fo:margin-bottom="0in" style:contextual-spacing="false" fo:text-align="center" style:justify-single-word="false"/>
      <style:text-properties style:font-name="Times New Roman" fo:font-size="10pt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14" style:family="paragraph" style:parent-style-name="Text_20_body">
      <style:paragraph-properties fo:margin-left="0in" fo:margin-top="0in" fo:margin-bottom="0.0835in" style:contextual-spacing="false" fo:text-align="center" style:justify-single-word="false"/>
      <style:text-properties style:font-name="Times New Roman" fo:font-size="10pt" fo:language="hr" fo:country="HR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15" style:family="paragraph" style:parent-style-name="Standard">
      <style:text-properties fo:language="hr" fo:country="HR"/>
    </style:style>
    <style:style style:name="P16" style:family="paragraph" style:parent-style-name="Text_20_body">
      <style:paragraph-properties fo:keep-together="auto"/>
      <style:text-properties fo:language="hr" fo:country="HR"/>
    </style:style>
    <style:style style:name="P17" style:family="paragraph" style:parent-style-name="Header">
      <style:paragraph-properties fo:margin-top="0in" fo:margin-bottom="0.0835in" style:contextual-spacing="false"/>
    </style:style>
    <style:style style:name="P18" style:family="paragraph" style:parent-style-name="Header">
      <style:paragraph-properties fo:margin-top="0.0835in" fo:margin-bottom="0.0835in" style:contextual-spacing="false"/>
      <style:text-properties fo:language="hr" fo:country="HR"/>
    </style:style>
    <style:style style:name="P19" style:family="paragraph" style:parent-style-name="Header">
      <style:paragraph-properties fo:margin-top="0.0835in" fo:margin-bottom="0.0835in" style:contextual-spacing="false"/>
    </style:style>
    <style:style style:name="P20" style:family="paragraph" style:parent-style-name="Header">
      <style:paragraph-properties fo:margin-top="0.0835in" fo:margin-bottom="0.0835in" style:contextual-spacing="false" fo:keep-together="always" fo:keep-with-next="always"/>
    </style:style>
    <style:style style:name="P21" style:family="paragraph" style:parent-style-name="Header">
      <style:paragraph-properties fo:margin-top="0.0835in" fo:margin-bottom="0.0835in" style:contextual-spacing="false"/>
      <style:text-properties fo:language="hr" fo:country="HR" fo:font-weight="bold" style:font-weight-asian="bold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anguage="hr" fo:country="HR" fo:font-style="italic" style:font-style-asian="italic"/>
    </style:style>
    <style:style style:name="T5" style:family="text">
      <style:text-properties fo:language="hr" fo:country="HR" fo:font-weight="bold" style:font-weight-asian="bold"/>
    </style:style>
    <style:style style:name="T6" style:family="text">
      <style:text-properties fo:language="hr" fo:country="HR"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Rad na kibernetičkoj sigurnosti</text:span></text:p>
        <text:p text:style-name="P2" loext:marker-style-name="T1"><text:span text:style-name="T1">Projektna dokumentacija</text:span><text:span text:style-name="T1"/></text:p>
        <text:p text:style-name="P3" loext:marker-style-name="T1"/>
        <text:p text:style-name="P4" loext:marker-style-name="T2"><text:span text:style-name="T2">Verzija &lt;1.0&gt;</text:span><text:span text:style-name="T2"/></text:p>
      </text:section>
      <text:p text:style-name="P5" loext:marker-style-name="T1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 loext:marker-style-name="T3"><text:span text:style-name="T1">1.</text:span><text:span text:style-name="T3"><text:tab/></text:span><text:span text:style-name="T1">Puni naziv projekta</text:span><text:tab/>4</text:p>
          <text:p text:style-name="P6" loext:marker-style-name="T3"><text:span text:style-name="T1">2.</text:span><text:span text:style-name="T3"><text:tab/></text:span><text:span text:style-name="T1">Skraćeni naziv projekta</text:span><text:tab/>4</text:p>
          <text:p text:style-name="P6" loext:marker-style-name="T3"><text:span text:style-name="T1">3.</text:span><text:span text:style-name="T3"><text:tab/></text:span><text:span text:style-name="T1">Opis problema/teme projekta</text:span><text:tab/>4</text:p>
          <text:p text:style-name="P6" loext:marker-style-name="T3"><text:span text:style-name="T1">4.</text:span><text:span text:style-name="T3"><text:tab/></text:span><text:span text:style-name="T1">Cilj projekta</text:span><text:tab/>4</text:p>
          <text:p text:style-name="P6" loext:marker-style-name="T3"><text:span text:style-name="T1">5.</text:span><text:span text:style-name="T3"><text:tab/></text:span><text:span text:style-name="T1">Voditelj studentskog tima</text:span><text:tab/>4</text:p>
          <text:p text:style-name="P6" loext:marker-style-name="T3"><text:span text:style-name="T1">6.</text:span><text:span text:style-name="T3"><text:tab/></text:span><text:span text:style-name="T1">Rezultat(i)</text:span><text:tab/>4</text:p>
          <text:p text:style-name="P6" loext:marker-style-name="T3"><text:span text:style-name="T1">7.</text:span><text:span text:style-name="T3"><text:tab/></text:span><text:span text:style-name="T1">Slični projekti</text:span><text:tab/>4</text:p>
          <text:p text:style-name="P6" loext:marker-style-name="T3"><text:span text:style-name="T1">8.</text:span><text:span text:style-name="T3"><text:tab/></text:span><text:span text:style-name="T1">Resursi</text:span><text:tab/>4</text:p>
          <text:p text:style-name="P6" loext:marker-style-name="T3"><text:span text:style-name="T1">9.</text:span><text:span text:style-name="T3"><text:tab/></text:span><text:span text:style-name="T1">Glavni rizici</text:span><text:tab/>5</text:p>
          <text:p text:style-name="P7" loext:marker-style-name="T3"><text:span text:style-name="T1">10.</text:span><text:span text:style-name="T3"><text:tab/></text:span><text:span text:style-name="T1">Smanjivanje rizika</text:span><text:tab/>5</text:p>
          <text:p text:style-name="P7" loext:marker-style-name="T3"><text:span text:style-name="T1">11.</text:span><text:span text:style-name="T3"><text:tab/></text:span><text:span text:style-name="T1">Glavne faze projekta</text:span><text:tab/>5</text:p>
          <text:p text:style-name="P7" loext:marker-style-name="T3"><text:span text:style-name="T1">12.</text:span><text:span text:style-name="T3"><text:tab/></text:span><text:span text:style-name="T1">Struktura raspodijeljenog posla (engl. </text:span><text:span text:style-name="T4">Work Breakdown Structure</text:span><text:span text:style-name="T1"> - WBS)</text:span><text:tab/>5</text:p>
          <text:p text:style-name="P7" loext:marker-style-name="T3"><text:span text:style-name="T1">13.</text:span><text:span text:style-name="T3"><text:tab/></text:span><text:span text:style-name="T1">Kontrolne točke projekta</text:span><text:tab/>5</text:p>
          <text:p text:style-name="P7" loext:marker-style-name="T3"><text:span text:style-name="T1">14.</text:span><text:span text:style-name="T3"><text:tab/></text:span><text:span text:style-name="T1">Gantogram</text:span><text:tab/>5</text:p>
          <text:p text:style-name="P7" loext:marker-style-name="T3"><text:span text:style-name="T1">15.</text:span><text:span text:style-name="T3"><text:tab/></text:span><text:span text:style-name="T1">Zapisnici sastanaka</text:span><text:tab/>5</text:p>
        </text:index-body>
      </text:table-of-content>
      <text:p text:style-name="P8" loext:marker-style-name="T1"/>
      <text:p text:style-name="P9" loext:marker-style-name="T1"><text:span text:style-name="T1">Prijedlog i plan projekta</text:span><text:span text:style-name="T1"/></text:p>
      <text:p text:style-name="P10" loext:marker-style-name="T1"/>
      <text:p text:style-name="InfoBlue" loext:marker-style-name="T1"><text:span text:style-name="T1">Na koji način koristiti predložak?</text:span><text:span text:style-name="T1"/></text:p>
      <text:p text:style-name="P10" loext:marker-style-name="T1"/>
      <text:p text:style-name="InfoBlue" loext:marker-style-name="T1"><text:span text:style-name="T1">Tekst pisan u italic formi opisuje koje informacije je potrebno uključiti u pojedino poglavlje Prijedloga.</text:span><text:span text:style-name="T1"/></text:p>
      <text:p text:style-name="InfoBlue" loext:marker-style-name="T1"><text:span text:style-name="T1">Za upis vlastitog teksta, potrebno je pritisnuti &lt;ENTER&gt; nakon italic teksta. </text:span><text:span text:style-name="T1"/></text:p>
      <text:p text:style-name="InfoBlue" loext:marker-style-name="T1"><text:span text:style-name="T1">Tekst upisan u &lt;trokutastim zagradama&gt; treba zamijeniti s onim što se navodi.</text:span><text:span text:style-name="T1"/></text:p>
      <text:p text:style-name="P10" loext:marker-style-name="T1"/>
      <text:p text:style-name="InfoBlue" loext:marker-style-name="T1"><text:span text:style-name="T1">Svi članovi tima trebaju pročitati plan i suglasiti se s njime, a to potvrđuju svojim potpisom na kraju dokumenta.</text:span><text:span text:style-name="T1"/></text:p>
      <text:p text:style-name="P11" loext:marker-style-name="T1"/>
      <text:h text:style-name="P12" text:outline-level="1" loext:marker-style-name="T1"><text:bookmark-start text:name="_Toc179182954"/><text:span text:style-name="T1">Puni naziv projekta</text:span><text:bookmark-end text:name="_Toc179182954"/><text:span text:style-name="T1"/></text:h>
      <text:p text:style-name="InfoBlue" loext:marker-style-name="T1"><text:span text:style-name="T1">[Navesti puni naziv projekta iz kojeg će biti vidljiva problematika/tematika kojom se projekt bavi.]</text:span><text:span text:style-name="T1"/></text:p>
      <text:p text:style-name="P11" loext:marker-style-name="T1"/>
      <text:h text:style-name="Heading_20_1" text:outline-level="1" loext:marker-style-name="T1"><text:bookmark-start text:name="_Toc179182955"/><text:span text:style-name="T1">Skraćeni naziv projekta</text:span><text:bookmark-end text:name="_Toc179182955"/><text:span text:style-name="T1"/></text:h>
      <text:p text:style-name="InfoBlue" loext:marker-style-name="T1"><text:span text:style-name="T1">[Navesti skraćeni naziv projekta, ako je definiran.]</text:span><text:span text:style-name="T1"/></text:p>
      <text:p text:style-name="P11" loext:marker-style-name="T1"/>
      <text:h text:style-name="Heading_20_1" text:outline-level="1" loext:marker-style-name="T1"><text:bookmark-start text:name="_Toc179182956"/><text:span text:style-name="T1">Opis problema/teme projekta</text:span><text:bookmark-end text:name="_Toc179182956"/><text:span text:style-name="T1"/></text:h>
      <text:p text:style-name="InfoBlue" loext:marker-style-name="T1"><text:span text:style-name="T1">[Objasniti problem, odnosno temu projekta, objasniti ukratko tip, uvjete i kontekst projekta.]</text:span><text:span text:style-name="T1"/></text:p>
      <text:p text:style-name="P11" loext:marker-style-name="T1"/>
      <text:h text:style-name="Heading_20_1" text:outline-level="1" loext:marker-style-name="T1"><text:bookmark-start text:name="_Toc179182957"/><text:span text:style-name="T1">Cilj projekta</text:span><text:bookmark-end text:name="_Toc179182957"/><text:span text:style-name="T1"/></text:h>
      <text:p text:style-name="InfoBlue" loext:marker-style-name="T1"><text:span text:style-name="T1">[Navesti predviđeni cilj ili ciljeve projekta. Definiranje ciljeva omogućuje određivanje pravca u kojem će se kretati izvođenje projekta. Navesti predviđeno trajanje projekta.]</text:span><text:span text:style-name="T1"/></text:p>
      <text:p text:style-name="P11" loext:marker-style-name="T1"/>
      <text:h text:style-name="Heading_20_1" text:outline-level="1" loext:marker-style-name="T1"><text:bookmark-start text:name="_Toc179182958"/><text:span text:style-name="T1">Voditelj studentskog tima</text:span><text:bookmark-end text:name="_Toc179182958"/><text:span text:style-name="T1"/></text:h>
      <text:p text:style-name="InfoBlue" loext:marker-style-name="T1"><text:span text:style-name="T1">&lt;Ime i prezime studenta&gt;</text:span><text:span text:style-name="T1"/></text:p>
      <text:p text:style-name="P11" loext:marker-style-name="T1"/>
      <text:h text:style-name="Heading_20_1" text:outline-level="1" loext:marker-style-name="T1"><text:span text:style-name="T1"><text:tab/></text:span><text:bookmark-start text:name="_Toc179182959"/><text:span text:style-name="T1">Rezultat(i)</text:span><text:bookmark-end text:name="_Toc179182959"/><text:span text:style-name="T1"/></text:h>
      <text:p text:style-name="InfoBlue" loext:marker-style-name="T1"><text:span text:style-name="T1">[Navesti što će se isporučiti na kraju projekta, voditi računa da osim rezultata u vidu nekog proizvoda ovdje treba navesti i svu dokumentaciju.]</text:span><text:span text:style-name="T1"/></text:p>
      <text:p text:style-name="P11" loext:marker-style-name="T1"/>
      <text:h text:style-name="Heading_20_1" text:outline-level="1" loext:marker-style-name="T1"><text:bookmark-start text:name="_Toc179182960"/><text:bookmark-start text:name="_Toc100054240"/><text:span text:style-name="T1">Slični projekti</text:span><text:bookmark-end text:name="_Toc179182960"/><text:span text:style-name="T1"/></text:h>
      <text:p text:style-name="InfoBlue" loext:marker-style-name="T1"><text:span text:style-name="T1">[Navesti projekte koji su povezani s dotičnim projektom.]</text:span><text:span text:style-name="T1"/></text:p>
      <text:p text:style-name="P11" loext:marker-style-name="T1"/>
      <text:h text:style-name="Heading_20_1" text:outline-level="1" loext:marker-style-name="T1"><text:bookmark-start text:name="_Toc179182961"/><text:span text:style-name="T1">Resursi</text:span><text:bookmark-end text:name="_Toc179182961"/><text:bookmark-end text:name="_Toc100054240"/><text:span text:style-name="T1"/></text:h>
      <text:p text:style-name="InfoBlue" loext:marker-style-name="T1"><text:span text:style-name="T1">[Navesti ljudske i ostale resurse potrebne za uspješno dovršenje projekta. Popuniti tablicu raspoloživih članova tima s podacima važnim za projekt. Mogu se navesti znanja i vještine člana koje mogu biti od koristi za projekt, na primjer znanja Java-e, XML-a, iskustvo u radu s MS Projectom, sudjelovanje u sličnim projektima ili bilo kakva korisna informacija. Ako projekt koristi i druge resurse napraviti posebnu tablicu za njih. U kolonu Napomene treba upisati sve termine kad dotični član tima neće biti raspoloživ za rad na projektu (putovanja, odmori, odsustva).]</text:span><text:span text:style-name="T1"/></text:p>
      <text:p text:style-name="Text_20_body" loext:marker-style-name="T5"><text:span text:style-name="T5">Tablica ljudskih resursa</text:span><text:span text:style-name="T5"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3" loext:marker-style-name="T5"><text:span text:style-name="T5">Ime i prezime</text:span><text:span text:style-name="T5"/></text:p>
          </table:table-cell>
          <table:table-cell table:style-name="Table3.A1" office:value-type="string">
            <text:p text:style-name="P13" loext:marker-style-name="T5"><text:span text:style-name="T5">E-mail adresa</text:span><text:span text:style-name="T5"/></text:p>
          </table:table-cell>
          <table:table-cell table:style-name="Table3.A1" office:value-type="string">
            <text:p text:style-name="P13" loext:marker-style-name="T5"><text:span text:style-name="T5">GSM broj</text:span><text:span text:style-name="T5"/></text:p>
          </table:table-cell>
          <table:table-cell table:style-name="Table3.A1" office:value-type="string">
            <text:p text:style-name="P13" loext:marker-style-name="T5"><text:span text:style-name="T5">Napomene</text:span><text:span text:style-name="T5"/></text:p>
          </table:table-cell>
        </table:table-row>
        <table:table-row table:style-name="Table3.1"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</table:table-row>
        <table:table-row table:style-name="Table3.1"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</table:table-row>
        <table:table-row table:style-name="Table3.1"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</table:table-row>
        <table:table-row table:style-name="Table3.1"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</table:table-row>
        <table:table-row table:style-name="Table3.1"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</table:table-row>
        <table:table-row table:style-name="Table3.1"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  <table:table-cell table:style-name="Table3.A1" office:value-type="string">
            <text:p text:style-name="P14" loext:marker-style-name="T1"/>
          </table:table-cell>
        </table:table-row>
      </table:table>
      <text:h text:style-name="Heading_20_1" text:outline-level="1" loext:marker-style-name="T1"><text:bookmark-start text:name="_Toc179182962"/><text:soft-page-break/><text:span text:style-name="T1">Glavni rizici</text:span><text:bookmark-end text:name="_Toc179182962"/><text:span text:style-name="T1"/></text:h>
      <text:p text:style-name="InfoBlue" loext:marker-style-name="T1"><text:span text:style-name="T1">[Navesti glavne zapreke za ostvarenje uspjeha projekta, te posljedice ukoliko projekt ne uspije.]</text:span><text:span text:style-name="T1"/></text:p>
      <text:p text:style-name="P11" loext:marker-style-name="T1"/>
      <text:h text:style-name="Heading_20_1" text:outline-level="1" loext:marker-style-name="T1"><text:bookmark-start text:name="_Toc179182963"/><text:span text:style-name="T1">Smanjivanje rizika</text:span><text:bookmark-end text:name="_Toc179182963"/><text:span text:style-name="T1"/></text:h>
      <text:p text:style-name="InfoBlue" loext:marker-style-name="T1"><text:span text:style-name="T1">[Navesti korake koji će se poduzeti kako bi se što je moguće više umanjio svaki od prethodno navedenih rizika.]</text:span><text:span text:style-name="T1"/></text:p>
      <text:p text:style-name="P11" loext:marker-style-name="T1"/>
      <text:h text:style-name="Heading_20_1" text:outline-level="1" loext:marker-style-name="T1"><text:bookmark-start text:name="_Toc100054243"/><text:bookmark-start text:name="_Toc179182964"/><text:span text:style-name="T1">Glavne faze projekta</text:span><text:bookmark-end text:name="_Toc100054243"/><text:bookmark-end text:name="_Toc179182964"/><text:span text:style-name="T1"/></text:h>
      <text:p text:style-name="InfoBlue" loext:marker-style-name="T1"><text:span text:style-name="T1">[Navesti glavne faze projekta, te ukratko objašnjenje po kojem načelu je projekt podijeljen na te faze- vremenska organizacija, smanjenje rizika, raspoloživost resursa i/ili nešto drugo.]</text:span><text:span text:style-name="T1"/></text:p>
      <text:p text:style-name="Text_20_body" loext:marker-style-name="T1"><text:span text:style-name="T1">1. Faza: .......</text:span><text:span text:style-name="T1"/></text:p>
      <text:h text:style-name="Heading_20_1" text:outline-level="1" loext:marker-style-name="T1"><text:bookmark-start text:name="_Toc100054244"/><text:bookmark-start text:name="_Toc179182965"/><text:span text:style-name="T1">Struktura raspodijeljenog posla (engl. </text:span><text:span text:style-name="T4">Work Breakdown Structure</text:span><text:span text:style-name="T1"> - WBS)</text:span><text:bookmark-end text:name="_Toc100054244"/><text:bookmark-end text:name="_Toc179182965"/></text:h>
      <text:p text:style-name="InfoBlue" loext:marker-style-name="T1"><text:span text:style-name="T1">[Nacrtati WBS s navedenim aktivnostima projekta.]</text:span><text:span text:style-name="T1"/></text:p>
      <text:p text:style-name="Text_20_body" loext:marker-style-name="T1"><text:span text:style-name="T1">Slika</text:span><text:span text:style-name="T1"/></text:p>
      <text:h text:style-name="Heading_20_1" text:outline-level="1" loext:marker-style-name="T1"><text:bookmark-start text:name="_Toc179182966"/><text:span text:style-name="T1">Kontrolne točke projekta</text:span><text:bookmark-end text:name="_Toc179182966"/><text:span text:style-name="T1"> (engl. </text:span><text:span text:style-name="T6">milestones</text:span><text:span text:style-name="T1">)</text:span></text:h>
      <text:p text:style-name="InfoBlue" loext:marker-style-name="T1"><text:span text:style-name="T1">[Općenito, kontrolna točka projekta je događaj ili rezultat neke aktivnosti koji ukazuje na to je li projekt u skladu sa zadanim rokovima ili kasni. Ta informacija se upisuje u kolonu o statusu projekta. Ako projekt kasni moraju se poduzeti akcije da se rokovi dostignu. Za svaku kontrolnu točku treba odrediti točan datum. Po potrebi se mogu dodavati ili oduzimati redovi tablice.]</text:span><text:span text:style-name="T1"/></text:p>
      <text:p text:style-name="Text_20_body" loext:marker-style-name="T5"><text:span text:style-name="T5">Tablica kontrolnih točki projekta</text:span><text:span text:style-name="T5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 loext:marker-style-name="T5"><text:span text:style-name="T5">Kontrolne točke</text:span><text:span text:style-name="T5"/></text:p>
          </table:table-cell>
          <table:table-cell table:style-name="Table4.A1" office:value-type="string">
            <text:p text:style-name="P13" loext:marker-style-name="T5"><text:span text:style-name="T5">Planirani datum</text:span><text:span text:style-name="T5"/></text:p>
          </table:table-cell>
          <table:table-cell table:style-name="Table4.A1" office:value-type="string">
            <text:p text:style-name="P13" loext:marker-style-name="T5"><text:span text:style-name="T5">Realizirani datum </text:span><text:span text:style-name="T5"/></text:p>
          </table:table-cell>
          <table:table-cell table:style-name="Table4.A1" office:value-type="string">
            <text:p text:style-name="P13" loext:marker-style-name="T5"><text:span text:style-name="T5">Status projekta</text:span><text:span text:style-name="T5"/></text:p>
          </table:table-cell>
        </table:table-row>
        <table:table-row table:style-name="Table4.1"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</table:table-row>
        <table:table-row table:style-name="Table4.1"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</table:table-row>
        <table:table-row table:style-name="Table4.1"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</table:table-row>
        <table:table-row table:style-name="Table4.1"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  <table:table-cell table:style-name="Table4.A1" office:value-type="string">
            <text:p text:style-name="P14" loext:marker-style-name="T1"/>
          </table:table-cell>
        </table:table-row>
      </table:table>
      <text:p text:style-name="P15" loext:marker-style-name="T1"/>
      <text:h text:style-name="Heading_20_1" text:outline-level="1" loext:marker-style-name="T1"><text:bookmark-start text:name="_Toc179182967"/><text:span text:style-name="T1">Gantogram</text:span><text:bookmark-end text:name="_Toc179182967"/><text:span text:style-name="T1"/></text:h>
      <text:p text:style-name="InfoBlue" loext:marker-style-name="T1"><text:span text:style-name="T1">[Izraditi Gantogram pomoću programa MS Project, Open Workbench, Microsoft Excel - </text:span>http://office.microsoft.com/hr-hr/excel/HA010346051050.aspx,<text:span text:style-name="T1"> i sl. Pohraniti prikaz Gantograma (screenshot) i postaviti ga unutar ovog poglavlja kao ubačenu sliku.]</text:span></text:p>
      <text:p text:style-name="Text_20_body" loext:marker-style-name="T1"><text:span text:style-name="T1">Slika</text:span><text:span text:style-name="T1"/></text:p>
      <text:h text:style-name="Heading_20_1" text:outline-level="1" loext:marker-style-name="T1"><text:bookmark-start text:name="_Toc179182968"/><text:span text:style-name="T1">Zapisnici sastanaka</text:span><text:bookmark-end text:name="_Toc179182968"/><text:span text:style-name="T1"/></text:h>
      <text:p text:style-name="InfoBlue" loext:marker-style-name="T1"><text:span text:style-name="T1">[Ovdje za svaki održani sastanak navesti: datum, vrijeme i mjesto održavanja sastanaka, popis nazočnih, glavne zaključke sastanka.]</text:span><text:span text:style-name="T1"/></text:p>
      <text:p text:style-name="P16" loext:marker-style-name="T1"/>
      <text:p text:style-name="P16" loext:marker-style-name="T1"/>
      <text:p text:style-name="P16" loext:marker-style-name="T1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 loext:marker-style-name="T5"><text:span text:style-name="T5">Suglasan s dokumentom (potpisuju članovi tima):</text:span><text:span text:style-name="T5"/></text:p>
          </table:table-cell>
          <table:table-cell table:style-name="Table5.A1" office:value-type="string">
            <text:p text:style-name="P18" loext:marker-style-name="T1"/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P19" loext:marker-style-name="T1"><text:span text:style-name="T1">&lt; Ime i prezime &gt;</text:span><text:span text:style-name="T1"/></text:p>
          </table:table-cell>
          <table:table-cell table:style-name="Table5.A1" office:value-type="string">
            <text:p text:style-name="P19" loext:marker-style-name="T1"><text:span text:style-name="T1">Datum: ____________ <text:s text:c="2"/>Potpis: ____________</text:span><text:span text:style-name="T1"/></text:p>
          </table:table-cell>
        </table:table-row>
      </table:table>
      <text:p text:style-name="P11" loext:marker-style-name="T1"/>
      <text:p text:style-name="P15" loext:marker-style-name="T1"/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P20" loext:marker-style-name="T5"><text:span text:style-name="T5">Odobrio(potpisuje nastavnik):</text:span><text:span text:style-name="T5"/></text:p>
              <text:p text:style-name="P19" loext:marker-style-name="T5"><text:span text:style-name="T1">&lt; Ime i prezime &gt;</text:span><text:span text:style-name="T5"/></text:p>
            </table:table-cell>
            <table:table-cell table:style-name="Table8.A1" office:value-type="string">
              <text:p text:style-name="P21" loext:marker-style-name="T5"/>
            </table:table-cell>
          </table:table-row>
        </table:table>
      </text:section>
      <text:section text:style-name="Sect1" text:name="Section2"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19" loext:marker-style-name="T1"><text:span text:style-name="T1">Datum: ____________</text:span><text:span text:style-name="T1"/></text:p>
            </table:table-cell>
            <table:table-cell table:style-name="Table9.A1" office:value-type="string">
              <text:p text:style-name="P19" loext:marker-style-name="T1"><text:span text:style-name="T1">Potpis: ____________</text:span><text:span text:style-name="T1"/></text:p>
            </table:table-cell>
          </table:table-row>
        </table:table>
        <text:p text:style-name="P15" loext:marker-style-name="T1"/>
        <text:p text:style-name="P15" loext:marker-style-name="T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1665in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top="0in" fo:margin-bottom="0.0835in" style:contextual-spacing="false" fo:keep-together="always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0835in" fo:margin-bottom="0.0417in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chapter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chapter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chapter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2in"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2in"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2in"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2in"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2in"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top="0.0555in" fo:margin-bottom="0in" style:contextual-spacing="false" fo:text-align="justify" style:justify-single-word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right="0.5in" fo:margin-top="0.1665in" fo:margin-bottom="0.0417in" style:contextual-spacing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874in">
        <style:tab-stops>
          <style:tab-stop style:position="1in"/>
          <style:tab-stop style:position="1.11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>
      <style:paragraph-properties fo:margin-left="0.5in" fo:text-indent="-0.3in" style:auto-text-indent="false"/>
    </style:style>
    <style:style style:name="Bullet2" style:family="paragraph" style:parent-style-name="Standard">
      <style:paragraph-properties fo:margin-left="1in" fo:text-indent="-0.25in" style:auto-text-indent="false"/>
      <style:text-properties fo:color="#000080" loext:opacity="100%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/>
    </style:style>
    <style:style style:name="Footnote" style:family="paragraph" style:parent-style-name="Standard" style:class="extra">
      <style:paragraph-properties fo:margin-left="0.25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top="0.0555in" fo:margin-bottom="0in" style:contextual-spacing="false" fo:line-height="100%" fo:text-align="justify" style:justify-single-word="false"/>
    </style:style>
    <style:style style:name="Paragraph4" style:family="paragraph" style:parent-style-name="Standard">
      <style:paragraph-properties fo:margin-left="1.5626in" fo:margin-top="0.0555in" fo:margin-bottom="0in" style:contextual-spacing="false" fo:line-height="100%" fo:text-align="justify" style:justify-single-word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165in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5555in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6945in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8335in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.972in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111in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0.5in" fo:margin-right="0.25in" fo:margin-top="0.0835in" fo:margin-bottom="0in" style:contextual-spacing="false" fo:line-height="100%" fo:text-align="justify" style:justify-single-word="false" fo:orphans="2" fo:widows="2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style:class="text"/>
    <style:style style:name="annotation_20_subject" style:display-name="annotation subject" style:family="paragraph" style:parent-style-name="Marginalia" style:next-style-name="Marginalia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swiss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8" number:language="hr" number:country="HR">
      <number:year number:style="long"/>
    </number:date-style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1" style:family="table">
      <style:table-properties style:width="6.6375in" fo:margin-left="0.0049in" fo:margin-top="0in" fo:margin-bottom="0in" table:align="left" style:writing-mode="page"/>
    </style:style>
    <style:style style:name="Table1.A" style:family="table-column">
      <style:table-column-properties style:column-width="4.4299in"/>
    </style:style>
    <style:style style:name="Table1.B" style:family="table-column">
      <style:table-column-properties style:column-width="2.2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Table2" style:family="table">
      <style:table-properties style:width="6.5875in" fo:margin-left="0in" fo:margin-top="0in" fo:margin-bottom="0in" table:align="left" style:writing-mode="page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.6375in" fo:margin-left="0.0049in" fo:margin-top="0in" fo:margin-bottom="0in" table:align="left" style:writing-mode="page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75pt solid #000000"/>
    </style:style>
    <style:style style:name="Table7" style:family="table">
      <style:table-properties style:width="6.5875in" fo:margin-left="0in" fo:margin-top="0in" fo:margin-bottom="0in" table:align="left" style:writing-mode="page"/>
    </style:style>
    <style:style style:name="Table7.A" style:family="table-column">
      <style:table-column-properties style:column-width="2.1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text-properties officeooo:rsid="00053e5b" officeooo:paragraph-rsid="00053e5b"/>
    </style:style>
    <style:style style:name="MP2" style:family="paragraph" style:parent-style-name="Standard">
      <style:paragraph-properties fo:margin-right="0.0472in" fo:margin-top="0.028in" fo:margin-bottom="0in" style:contextual-spacing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right="0.25in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language="hr" fo:country="HR"/>
    </style:style>
    <style:style style:name="MT2" style:family="text">
      <style:text-properties fo:language="hr" fo:country="HR" officeooo:rsid="00053e5b"/>
    </style:style>
    <style:style style:name="MT3" style:family="text">
      <style:text-properties fo:font-family="Symbol" style:font-family-generic="roman" style:font-pitch="variable" style:font-charset="x-symbol" fo:language="hr" fo:country="HR" style:font-family-asian="Symbol" style:font-family-generic-asian="system" style:font-pitch-asian="variable" style:font-family-complex="Symbol" style:font-family-generic-complex="system" style:font-pitch-complex="variabl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 loext:marker-style-name="MT1"><text:span text:style-name="MT1">Rad na kibernetičkoj sigurnosti</text:span></text:p>
            </table:table-cell>
            <table:table-cell table:style-name="Table1.A1" office:value-type="string">
              <text:p text:style-name="MP2" loext:marker-style-name="MT1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MT1"><text:span text:style-name="MT1">Projektna dokumentacija</text:span><text:span text:style-name="MT1"/></text:p>
            </table:table-cell>
            <table:table-cell table:style-name="Table1.A1" office:value-type="string">
              <text:p text:style-name="Standard" loext:marker-style-name="MT1"><text:span text:style-name="MT1"><text:s text:c="2"/>Datum: <text:s/></text:span><text:span text:style-name="MT2">26.01.202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 loext:marker-style-name="MT1"><text:span text:style-name="MT1">FER - Projekt</text:span><text:span text:style-name="MT1"/></text:p>
            </table:table-cell>
            <table:table-cell table:style-name="Table2.A1" office:value-type="string">
              <text:p text:style-name="MP4" loext:marker-style-name="MT1"><text:span text:style-name="MT3"></text:span><text:span text:style-name="MT1">FER, </text:span><text:span text:style-name="MT1"><text:date style:data-style-name="N10118" text:date-value="2026-01-26T20:54:25.220625582">2026</text:date></text:span></text:p>
            </table:table-cell>
            <table:table-cell table:style-name="Table2.A1" office:value-type="string">
              <text:p text:style-name="MP5" loext:marker-style-name="MT1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6</text:page-count></text:span></text:span></text:p>
            </table:table-cell>
          </table:table-row>
        </table:table>
        <text:p text:style-name="Footer"/>
      </style:footer>
    </style:master-page>
    <style:master-page style:name="Converted1" style:page-layout-name="Mpm2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 loext:marker-style-name="MT1"><text:span text:style-name="MT1">Rad na kibernetičkoj sigurnosti</text:span></text:p>
            </table:table-cell>
            <table:table-cell table:style-name="Table6.A1" office:value-type="string">
              <text:p text:style-name="MP2" loext:marker-style-name="MT1"><text:span text:style-name="MT1"><text:s text:c="2"/>Verzija: <text:s text:c="10"/>&lt;1.0&gt;</text:span></text:p>
            </table:table-cell>
          </table:table-row>
          <table:table-row table:style-name="Table6.1">
            <table:table-cell table:style-name="Table6.A1" office:value-type="string">
              <text:p text:style-name="Standard" loext:marker-style-name="MT1"><text:span text:style-name="MT1">Projektna dokumentacija</text:span></text:p>
            </table:table-cell>
            <table:table-cell table:style-name="Table6.A1" office:value-type="string">
              <text:p text:style-name="Standard" loext:marker-style-name="MT1"><text:span text:style-name="MT1"><text:s text:c="2"/>Datum: <text:s/></text:span><text:span text:style-name="MT2">26.01.2026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3" loext:marker-style-name="MT1"><text:span text:style-name="MT1">FER - Projekt</text:span></text:p>
            </table:table-cell>
            <table:table-cell table:style-name="Table7.A1" office:value-type="string">
              <text:p text:style-name="MP4" loext:marker-style-name="MT1"><text:span text:style-name="MT3"></text:span><text:span text:style-name="MT1">FER, </text:span><text:span text:style-name="MT1"><text:date style:data-style-name="N10118" text:date-value="2026-01-26T20:54:25.223859949">2026</text:date></text:span></text:p>
            </table:table-cell>
            <table:table-cell table:style-name="Table7.A1" office:value-type="string">
              <text:p text:style-name="MP5" loext:marker-style-name="MT1"><text:span text:style-name="MT1">Stranica </text:span><text:span text:style-name="Page_20_Number"><text:span text:style-name="MT1"><text:page-number text:select-page="current">6</text:page-number></text:span></text:span><text:span text:style-name="Page_20_Number"><text:span text:style-name="MT1"><text:s/>od </text:span></text:span><text:span text:style-name="Page_20_Number"><text:span text:style-name="MT1"><text:page-count>6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velopment Case</dc:title>
    <dc:subject>&lt;Project Name&gt;</dc:subject>
    <meta:editing-cycles>3</meta:editing-cycles>
    <meta:print-date>2026-01-26T20:54:16.118372930</meta:print-date>
    <meta:creation-date>2026-01-26T20:33:12.157590741</meta:creation-date>
    <dc:date>2026-01-26T20:54:25.156270256</dc:date>
    <meta:editing-duration>PT1M9S</meta:editing-duration>
    <meta:generator>LibreOffice/25.2.7.2$Linux_X86_64 LibreOffice_project/7352e658ec7fb6dfcbe103e0f4f1c30e34085f91</meta:generator>
    <meta:printed-by>PDF files</meta:printed-by>
    <meta:document-statistic meta:table-count="9" meta:image-count="0" meta:object-count="0" meta:page-count="6" meta:paragraph-count="103" meta:word-count="703" meta:character-count="4759" meta:non-whitespace-character-count="4127"/>
    <meta:user-defined meta:name="AppVersion">16.0000</meta:user-defined>
    <meta:user-defined meta:name="Company">&lt;Company Name&gt;</meta:user-defined>
    <meta:template xlink:type="simple" xlink:actuate="onRequest" xlink:title="FER_Predmet_Projekt_PlanProjekta.dotx" xlink:href=""/>
  </office:meta>
</office:document-meta>
</file>